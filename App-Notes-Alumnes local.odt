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text-properties officeooo:rsid="0020cd0d" officeooo:paragraph-rsid="0020cd0d"/>
    </style:style>
    <style:style style:name="T1" style:family="text">
      <style:text-properties fo:font-variant="normal" fo:text-transform="none" fo:color="#272727" loext:opacity="100%" fo:font-family="'Neue Montreal', sans-serif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Internal Database URL</text:span> </text:p>
      <text:p text:style-name="Standard">postgresql://admin:IFGPHVEh5g4dY5Jl7KMEGxUG90bRHDQ2@dpg-d7tpvn67r5hc73dpnq70-a/notes_og5d</text:p>
      <text:p text:style-name="Standard"/>
      <text:p text:style-name="Standard"/>
      <text:p text:style-name="Standard"/>
      <text:p text:style-name="P2"><text:span text:style-name="T1">External Database URL</text:span> </text:p>
      <text:p text:style-name="P2"/>
      <text:p text:style-name="P2">postgresql://admin:IFGPHVEh5g4dY5Jl7KMEGxUG90bRHDQ2@dpg-d7tpvn67r5hc73dpnq70-a.frankfurt-postgres.render.com/notes_og5d</text:p>
      <text:p text:style-name="Standard"/>
      <text:p text:style-name="Standard"/>
      <text:p text:style-name="P3">Link a Render:</text:p>
      <text:p text:style-name="P3"/>
      <text:p text:style-name="P3"><text:a xlink:type="simple" xlink:href="https://contol-notes-v1.onrender.com/" text:style-name="Internet_20_link" text:visited-style-name="Visited_20_Internet_20_Link">https://contol-notes-v1.onrender.com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22:10:20.861411300</meta:creation-date>
    <dc:date>2026-05-07T15:50:27.985274300</dc:date>
    <meta:editing-duration>PT1H43M23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2" meta:character-count="303" meta:non-whitespace-character-count="295"/>
  </office:meta>
</office:document-meta>
</file>